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625" officeooo:paragraph-rsid="001c1625"/>
    </style:style>
    <style:style style:name="P2" style:family="paragraph" style:parent-style-name="Standard">
      <style:paragraph-properties fo:line-height="150%"/>
      <style:text-properties officeooo:rsid="001c1625" officeooo:paragraph-rsid="001c1625"/>
    </style:style>
    <style:style style:name="T1" style:family="text">
      <style:text-properties officeooo:rsid="001c1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pare Notes on Following T<text:span text:style-name="T1">opics</text:span></text:h>
      <text:p text:style-name="P1"/>
      <text:p text:style-name="P2">1. Class, Objects and relation between class and object.</text:p>
      <text:p text:style-name="P2">2. Attribute, Method and Member of a class.</text:p>
      <text:p text:style-name="P2">3. JRE, JVM, JDK and javac. The differences between them.</text:p>
      <text:p text:style-name="P2">4. Abstraction, Encapsulation, Inheritance and Polymorphis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14:12:01.127175339</meta:creation-date>
    <dc:date>2026-05-20T14:18:49.201391418</dc:date>
    <meta:editing-duration>PT6M52S</meta:editing-duration>
    <meta:editing-cycles>1</meta:editing-cycles>
    <meta:document-statistic meta:table-count="0" meta:image-count="0" meta:object-count="0" meta:page-count="1" meta:paragraph-count="5" meta:word-count="38" meta:character-count="249" meta:non-whitespace-character-count="216"/>
    <meta:generator>LibreOffice/24.2.7.2$Linux_X86_64 LibreOffice_project/420$Build-2</meta:generator>
  </office:meta>
</office:document-meta>
</file>